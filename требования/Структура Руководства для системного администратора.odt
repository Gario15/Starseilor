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D000000D592E41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16.501cm" table:align="left" style:writing-mode="lr-tb"/>
    </style:style>
    <style:style style:name="Таблица1.A" style:family="table-column">
      <style:table-column-properties style:column-width="2.826cm"/>
    </style:style>
    <style:style style:name="Таблица1.B" style:family="table-column">
      <style:table-column-properties style:column-width="13.675cm"/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49cm" fo:border="0.05pt solid #000000"/>
    </style:style>
    <style:style style:name="Таблица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left" style:writing-mode="lr-tb"/>
    </style:style>
    <style:style style:name="Таблица2.A" style:family="table-column">
      <style:table-column-properties style:column-width="5.791cm"/>
    </style:style>
    <style:style style:name="Таблица2.B" style:family="table-column">
      <style:table-column-properties style:column-width="10.71cm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="0.05pt solid #000000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officeooo:paragraph-rsid="000f7c40"/>
    </style:style>
    <style:style style:name="P6" style:family="paragraph" style:parent-style-name="Text_20_body">
      <style:paragraph-properties fo:text-align="start" style:justify-single-word="false"/>
      <style:text-properties officeooo:paragraph-rsid="000f7c40"/>
    </style:style>
    <style:style style:name="P7" style:family="paragraph" style:parent-style-name="Text_20_body">
      <style:paragraph-properties fo:text-align="end" style:justify-single-word="false"/>
      <style:text-properties officeooo:paragraph-rsid="000f7c40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Heading_20_3">
      <style:text-properties fo:font-size="6pt" style:font-size-asian="6pt" style:font-size-complex="6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0f7c40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>
      <style:paragraph-properties fo:margin-left="1cm" fo:margin-right="1cm" fo:text-indent="0cm" style:auto-text-indent="false"/>
    </style:style>
    <style:style style:name="P16" style:family="paragraph" style:parent-style-name="Text_20_body" style:list-style-name="L5"/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dfba" style:font-size-asian="12pt" style:font-size-complex="12pt"/>
    </style:style>
    <style:style style:name="T3" style:family="text">
      <style:text-properties fo:font-size="12pt" officeooo:rsid="000f7c40" style:font-size-asian="12pt" style:font-size-complex="12pt"/>
    </style:style>
    <style:style style:name="T4" style:family="text">
      <style:text-properties officeooo:rsid="000fa6e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/>
      <text:p text:style-name="P2"/>
      <text:p text:style-name="P2"/>
      <text:p text:style-name="P2"/>
      <text:p text:style-name="P2"/>
      <text:h text:style-name="P3" text:outline-level="3"><draw:frame draw:style-name="fr1" draw:name="Изображение1" text:anchor-type="paragraph" svg:y="-4.86cm" svg:width="6.271cm" svg:height="5.636cm" draw:z-index="0"><draw:image xlink:href="Pictures/10000000000000ED000000D592E41355.png" xlink:type="simple" xlink:show="embed" xlink:actuate="onLoad" draw:mime-type="image/png"/><svg:title>Google Диск — Википедия</svg:title></draw:frame></text:h>
      <text:p text:style-name="P4"/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5"><text:span text:style-name="Strong_20_Emphasis"><text:span text:style-name="T1">Программный продукт:</text:span></text:span><text:span text:style-name="T1"> Облачный диск «Google Drive»<text:line-break/><text:line-break/></text:span><text:span text:style-name="Strong_20_Emphasis"><text:span text:style-name="T1">Документ предназначен для:</text:span></text:span><text:span text:style-name="T1"> Специалистов по внедрению и поддержке Google Workspace, системных администраторов организации.</text:span></text:p>
      <text:p text:style-name="P2"><text:span text:style-name="Strong_20_Emphasis"><text:span text:style-name="T1">Руководство системного администратора</text:span></text:span></text:p>
      <text:p text:style-name="P6"><text:span text:style-name="Strong_20_Emphasis"><text:span text:style-name="T2">Страниц</text:span></text:span><text:span text:style-name="Strong_20_Emphasis"><text:span text:style-name="T3">: <text:s/></text:span></text:span><text:span text:style-name="Strong_20_Emphasis"><text:span text:style-name="T2">7</text:span></text:span></text:p>
      <text:p text:style-name="P7"><text:span text:style-name="Strong_20_Emphasis"><text:span text:style-name="T1">Дата:</text:span></text:span><text:span text:style-name="T1"> </text:span><text:span text:style-name="T3">14.05.2026</text:span></text:p>
      <text:p text:style-name="P7"><text:span text:style-name="Strong_20_Emphasis"><text:span text:style-name="T1">Версия:</text:span></text:span><text:span text:style-name="T1"> Google Workspace</text:span></text:p>
      <text:p text:style-name="P8"/>
      <text:h text:style-name="P9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АННОТАЦИЯ</text:h>
      <text:p text:style-name="Text_20_body">Настоящий документ содержит сведения, необходимые системному администратору для установки, настройки и сопровождения корпоративного доступа к Google Drive. Руководство описывает требования к оборудованию и ПО, структуру компонентов, процедуру развёртывания на компьютерах пользователей, проверку работоспособности и процесс обновления клиентского приложения.</text:p>
      <text:p text:style-name="Text_20_body"/>
      <text:h text:style-name="Heading_20_1" text:outline-level="1">СОДЕРЖАНИЕ</text:h>
      <text:list text:style-name="L1">
        <text:list-item>
          <text:p text:style-name="P10">Общие сведения о программе<text:line-break/>1.1 Назначение программы<text:line-break/>1.2 Условия применения<text:line-break/>1.2.1 Требования к оборудованию и программному обеспечению</text:p>
        </text:list-item>
        <text:list-item>
          <text:p text:style-name="P10">Структура программы</text:p>
        </text:list-item>
        <text:list-item>
          <text:p text:style-name="P10">Установка программы на компьютер пользователя</text:p>
        </text:list-item>
        <text:list-item>
          <text:p text:style-name="P10">Проверка работоспособности программы (по модулям)</text:p>
        </text:list-item>
        <text:list-item>
          <text:p text:style-name="P10">Обновление программы</text:p>
          <text:p text:style-name="P10"/>
        </text:list-item>
      </text:list>
      <text:h text:style-name="Heading_20_2" text:outline-level="2">1. Общие сведения о программе</text:h>
      <text:h text:style-name="Heading_20_3" text:outline-level="3">1.1 Назначение программы</text:h>
      <text:p text:style-name="Text_20_body">Google Drive – это облачное хранилище файлов с функциями синхронизации, совместного доступа и резервного копирования. Основные возможности:</text:p>
      <text:list text:style-name="L2">
        <text:list-item>
          <text:p text:style-name="P11">Хранение файлов организации в облаке Google.</text:p>
        </text:list-item>
        <text:list-item>
          <text:p text:style-name="P11">Доступ к файлам с любого устройства.</text:p>
        </text:list-item>
        <text:list-item>
          <text:p text:style-name="P12">Синхронизация локальных папок с облаком.</text:p>
        </text:list-item>
        <text:list-item>
          <text:p text:style-name="P12">Совместная работа над документами, таблицами, презентациями.</text:p>
        </text:list-item>
        <text:list-item>
          <text:p text:style-name="P11">Централизованное управление доступом и политиками через консоль администратора Google Workspace.</text:p>
        </text:list-item>
      </text:list>
      <text:h text:style-name="Heading_20_3" text:outline-level="3">1.2 Условия применения</text:h>
      <text:p text:style-name="Text_20_body">Корпоративное использование Google Drive предполагает наличие действующей подписки Google Workspace. Для работы требуется доступ в интернет.</text:p>
      <text:h text:style-name="Heading_20_4" text:outline-level="4">1.2.1 Требования к оборудованию и программному обеспечению</text:h>
      <text:p text:style-name="Text_20_body"><text:span text:style-name="Strong_20_Emphasis">Для клиента «Google Drive for Desktop»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ext:soft-page-break/>
          <table:table-row>
            <table:table-cell table:style-name="Таблица1.A1" office:value-type="string">
              <text:p text:style-name="Table_20_Heading">Параметр</text:p>
            </table:table-cell>
            <table:table-cell table:style-name="Таблица1.B1" office:value-type="string">
              <text:p text:style-name="Table_20_Heading">Минимальные требования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ОС</text:p>
          </table:table-cell>
          <table:table-cell table:style-name="Таблица1.B2" office:value-type="string">
            <text:p text:style-name="Table_20_Contents">Windows 10 / 11, <text:span text:style-name="T4">x</text:span>64-bit, Windows Server 2016/2019/2022</text:p>
          </table:table-cell>
        </table:table-row>
        <table:table-row>
          <table:table-cell table:style-name="Таблица1.A2" office:value-type="string">
            <text:p text:style-name="Table_20_Contents">Процессор</text:p>
          </table:table-cell>
          <table:table-cell table:style-name="Таблица1.B2" office:value-type="string">
            <text:p text:style-name="Table_20_Contents">Intel или AMD x86-64, 2+ ядра</text:p>
          </table:table-cell>
        </table:table-row>
        <table:table-row>
          <table:table-cell table:style-name="Таблица1.A2" office:value-type="string">
            <text:p text:style-name="Table_20_Contents">ОЗУ</text:p>
          </table:table-cell>
          <table:table-cell table:style-name="Таблица1.B2" office:value-type="string">
            <text:p text:style-name="Table_20_Contents">4 ГБ (рекомендуется 8 ГБ)</text:p>
          </table:table-cell>
        </table:table-row>
        <table:table-row>
          <table:table-cell table:style-name="Таблица1.A2" office:value-type="string">
            <text:p text:style-name="Table_20_Contents">Диск</text:p>
          </table:table-cell>
          <table:table-cell table:style-name="Таблица1.B2" office:value-type="string">
            <text:p text:style-name="Table_20_Contents">Не менее 1 ГБ свободного места под кэш и исполняемые файлы (рекомендуется от 10 ГБ в зависимости от объёма синхронизируемых данных)</text:p>
          </table:table-cell>
        </table:table-row>
        <table:table-row>
          <table:table-cell table:style-name="Таблица1.A2" office:value-type="string">
            <text:p text:style-name="Table_20_Contents">Сеть</text:p>
          </table:table-cell>
          <table:table-cell table:style-name="Таблица1.B2" office:value-type="string">
            <text:p text:style-name="Table_20_Contents">Доступ к <text:span text:style-name="Source_20_Text">*.googleapis.com</text:span>, <text:span text:style-name="Source_20_Text">*.google.com</text:span>, <text:span text:style-name="Source_20_Text">drive.google.com</text:span> по HTTPS (порт 443)</text:p>
          </table:table-cell>
        </table:table-row>
        <table:table-row>
          <table:table-cell table:style-name="Таблица1.A2" office:value-type="string">
            <text:p text:style-name="Table_20_Contents">Дополнительно</text:p>
          </table:table-cell>
          <table:table-cell table:style-name="Таблица1.B2" office:value-type="string">
            <text:p text:style-name="Table_20_Contents">Microsoft Visual C++ Redistributable for Visual Studio 2015-2022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Для веб-доступа к Google Drive</text:span> :</text:p>
      <text:list text:style-name="L3">
        <text:list-item>
          <text:p text:style-name="P13">Любая современная ОС.</text:p>
        </text:list-item>
        <text:list-item>
          <text:p text:style-name="P13">Браузеры: Google Chrome, Firefox, Edge, Safari последних версий.</text:p>
        </text:list-item>
        <text:list-item>
          <text:p text:style-name="P13">Включённый JavaScript и поддержка cookie.</text:p>
        </text:list-item>
      </text:list>
      <text:p text:style-name="Text_20_body"><text:span text:style-name="Strong_20_Emphasis">Требования к инфраструктуре организации</text:span>:</text:p>
      <text:list text:style-name="L4">
        <text:list-item>
          <text:p text:style-name="P14">Доступ в интернет со скоростью не менее 10 Мбит/с на одного интенсивного пользователя.</text:p>
        </text:list-item>
        <text:list-item>
          <text:p text:style-name="P14">Разрешить исходящие соединения на порты 443/TCP, 80/TCP для доменов Google.</text:p>
        </text:list-item>
        <text:list-item>
          <text:p text:style-name="P14">При использовании прокси – поддержка аутентификации NTLM или Basic.</text:p>
          <text:p text:style-name="P14"/>
        </text:list-item>
      </text:list>
      <text:h text:style-name="Heading_20_2" text:outline-level="2">2. Структура программы</text:h>
      <text:p text:style-name="Text_20_body">Программа «Google Drive for Desktop» состоит из следующих компонентов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Компонент</text:p>
            </table:table-cell>
            <table:table-cell table:style-name="Таблица2.B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<text:span text:style-name="Strong_20_Emphasis">Служба Google Drive</text:span> (<text:span text:style-name="Source_20_Text">GoogleDriveFS.exe</text:span>)</text:p>
          </table:table-cell>
          <table:table-cell table:style-name="Таблица2.B2" office:value-type="string">
            <text:p text:style-name="Table_20_Contents">Фоновая служба, запускаемая при старте системы. Отвечает за синхронизацию, мониторинг файлов, связь с облаком.</text:p>
          </table:table-cell>
        </table:table-row>
        <table:table-row>
          <table:table-cell table:style-name="Таблица2.A2" office:value-type="string">
            <text:p text:style-name="Table_20_Contents"><text:span text:style-name="Strong_20_Emphasis">Виртуальный диск (Drive letter)</text:span></text:p>
          </table:table-cell>
          <table:table-cell table:style-name="Таблица2.B2" office:value-type="string">
            <text:p text:style-name="Table_20_Contents">Создаётся смонтированный том (например, <text:span text:style-name="Source_20_Text">G:</text:span>), где отображаются все файлы облака (опционально – только метаданные).</text:p>
          </table:table-cell>
        </table:table-row>
        <table:table-row>
          <table:table-cell table:style-name="Таблица2.A2" office:value-type="string">
            <text:p text:style-name="Table_20_Contents"><text:span text:style-name="Strong_20_Emphasis">Интеграция с Проводником Windows</text:span></text:p>
          </table:table-cell>
          <table:table-cell table:style-name="Таблица2.B2" office:value-type="string">
            <text:p text:style-name="Table_20_Contents">Контекстное меню, значки статуса синхронизации, подсказки.</text:p>
          </table:table-cell>
        </table:table-row>
        <table:table-row>
          <table:table-cell table:style-name="Таблица2.A2" office:value-type="string">
            <text:p text:style-name="Table_20_Contents"><text:span text:style-name="Strong_20_Emphasis">Панель управления Google Drive</text:span></text:p>
          </table:table-cell>
          <table:table-cell table:style-name="Таблица2.B2" office:value-type="string">
            <text:p text:style-name="Table_20_Contents">Позволяет приостановить синхронизацию, просмотреть активность, освободить место, изменить настройки.</text:p>
          </table:table-cell>
        </table:table-row>
        <table:table-row>
          <table:table-cell table:style-name="Таблица2.A2" office:value-type="string">
            <text:p text:style-name="Table_20_Contents"><text:span text:style-name="Strong_20_Emphasis">Агент обновления</text:span></text:p>
          </table:table-cell>
          <table:table-cell table:style-name="Таблица2.B2" office:value-type="string">
            <text:p text:style-name="Table_20_Contents">Google Update (похож на Chrome) – автоматически проверяет и <text:soft-page-break/>устанавливает новые версии клиента.</text:p>
          </table:table-cell>
        </table:table-row>
      </table:table>
      <text:p text:style-name="P15">Примечание: сам Google Drive как облачный сервис – это клиент-серверная архитектура, где серверная часть принадлежит Google. Администрирование осуществляется через веб-консоль <text:a xlink:type="simple" xlink:href="https://admin.google.com/" office:target-frame-name="_blank" xlink:show="new" text:style-name="Internet_20_link" text:visited-style-name="Visited_20_Internet_20_Link">admin.google.com</text:a>.</text:p>
      <text:p text:style-name="P15"/>
      <text:h text:style-name="Heading_20_2" text:outline-level="2">3. Установка программы на компьютер пользователя</text:h>
      <text:p text:style-name="Text_20_body">Установка клиента «Google Drive for Desktop» на ПК с ОС Windows.</text:p>
      <text:h text:style-name="Heading_20_3" text:outline-level="3">3.1 Ручная установка</text:h>
      <text:list text:style-name="L5">
        <text:list-item>
          <text:p text:style-name="P16">Загрузите установщик с официального сайта:<text:line-break/><text:a xlink:type="simple" xlink:href="https://dl.google.com/drive-file-stream/GoogleDriveSetup.exe" office:target-frame-name="_blank" xlink:show="new" text:style-name="Internet_20_link" text:visited-style-name="Visited_20_Internet_20_Link">https://dl.google.com/drive-file-stream/GoogleDriveSetup.exe</text:a></text:p>
        </text:list-item>
        <text:list-item>
          <text:p text:style-name="P16">Запустите <text:span text:style-name="Source_20_Text">GoogleDriveSetup.exe</text:span> от имени <text:span text:style-name="Strong_20_Emphasis">локального администратора</text:span>.</text:p>
        </text:list-item>
        <text:list-item>
          <text:p text:style-name="P16">Следуйте указаниям мастера установки. Будет выполнено:</text:p>
          <text:list>
            <text:list-item>
              <text:p text:style-name="P16">Распаковка файлов в <text:span text:style-name="Source_20_Text">%ProgramFiles%\Google\Drive File Stream\</text:span></text:p>
            </text:list-item>
            <text:list-item>
              <text:p text:style-name="P16">Установка службы и драйвера виртуального диска</text:p>
            </text:list-item>
            <text:list-item>
              <text:p text:style-name="P16">Настройка автозапуска</text:p>
            </text:list-item>
          </text:list>
        </text:list-item>
        <text:list-item>
          <text:p text:style-name="P16">По окончании откроется окно входа в Google аккаунт. Пользователь должен войти под своим корпоративным аккаунтом.</text:p>
        </text:list-item>
        <text:list-item>
          <text:p text:style-name="P16">После успешной аутентификации будет создан виртуальный диск, а в системном трее появится значок Google Drive.</text:p>
        </text:list-item>
      </text:list>
      <text:h text:style-name="Heading_20_3" text:outline-level="3">3.2 Автоматическая установка для развёртывания через SCCM или групповые политики</text:h>
      <text:p text:style-name="Text_20_body">Используйте параметры командной строки:</text:p>
      <text:p text:style-name="Text_20_body">cmd</text:p>
      <text:p text:style-name="P17">GoogleDriveSetup.exe --silent --desktop_shortcut=false --start_menu_shortcut=false</text:p>
      <text:p text:style-name="Text_20_body">Дополнительные ключи:</text:p>
      <text:list text:style-name="L6">
        <text:list-item>
          <text:p text:style-name="P18"><text:span text:style-name="Source_20_Text">--force_install</text:span> – переустановка при наличии предыдущей версии.</text:p>
        </text:list-item>
        <text:list-item>
          <text:p text:style-name="P18"><text:span text:style-name="Source_20_Text">--disable_updates</text:span> – отключить автоматическое обновление.</text:p>
        </text:list-item>
      </text:list>
      <text:p text:style-name="Text_20_body">После установки можно предварительно настроить параметры синхронизации через реестр , например:</text:p>
      <text:list text:style-name="L7">
        <text:list-item>
          <text:p text:style-name="P19">Буква диска</text:p>
        </text:list-item>
        <text:list-item>
          <text:p text:style-name="P19">Режим потоковой передачи вместо полной синхронизации</text:p>
        </text:list-item>
      </text:list>
      <text:p text:style-name="P15"><text:soft-page-break/>Важно: перед массовой установкой убедитесь, что для всех пользователей разрешена установка приложений.</text:p>
      <text:h text:style-name="Heading_20_3" text:outline-level="3">3.3 Установка драйверов электронной защиты</text:h>
      <text:p text:style-name="Text_20_body">Google Drive не использует аппаратные ключи защиты. Аутентификация выполняется через OAuth 2.0 и корпоративный Identity Provider.</text:p>
      <text:h text:style-name="Heading_20_2" text:outline-level="2"/>
      <text:h text:style-name="Heading_20_2" text:outline-level="2">4. Проверка работоспособности программы</text:h>
      <text:p text:style-name="Text_20_body">После установки выполните следующие проверки для каждого модуля.</text:p>
      <text:h text:style-name="Heading_20_3" text:outline-level="3">Модуль 1: Аутентификация и доступ к облаку</text:h>
      <text:list text:style-name="L8">
        <text:list-item>
          <text:p text:style-name="P20">Запустите Google Drive через значок рабочего стола или меню «Пуск».</text:p>
        </text:list-item>
        <text:list-item>
          <text:p text:style-name="P20">Должно открыться окно входа в браузере.</text:p>
        </text:list-item>
        <text:list-item>
          <text:p text:style-name="P20">Войдите с корпоративными учётными данными.</text:p>
        </text:list-item>
        <text:list-item>
          <text:p text:style-name="P20">При успешной аутентификации трей-иконка станет цветной без знаков ошибки.</text:p>
        </text:list-item>
        <text:list-item>
          <text:p text:style-name="P20">Откройте Проводник Windows – отобразится диск <text:span text:style-name="Source_20_Text">Google Drive.</text:span></text:p>
        </text:list-item>
      </text:list>
      <text:h text:style-name="Heading_20_3" text:outline-level="3">Модуль 2: Синхронизация файлов</text:h>
      <text:list text:style-name="L9">
        <text:list-item>
          <text:p text:style-name="P21">В локальной папке <text:span text:style-name="Source_20_Text">G:\Мой диск</text:span> создайте тестовый текстовый файл <text:span text:style-name="Source_20_Text">test1.txt</text:span>.</text:p>
        </text:list-item>
        <text:list-item>
          <text:p text:style-name="P21">Дождитесь, пока значок синхронизации станет зелёной.</text:p>
        </text:list-item>
        <text:list-item>
          <text:p text:style-name="P21">Зайдите на <text:span text:style-name="Source_20_Text">drive.google.com</text:span> через веб-браузер – файл должен появиться.</text:p>
        </text:list-item>
        <text:list-item>
          <text:p text:style-name="P21">На веб-сайте создайте файл <text:span text:style-name="Source_20_Text">test2.txt</text:span> – через 1–2 минуты он отобразится на виртуальном диске.</text:p>
        </text:list-item>
      </text:list>
      <text:h text:style-name="Heading_20_3" text:outline-level="3">Модуль 3: Работа с файлами «по требованию»</text:h>
      <text:list text:style-name="L10">
        <text:list-item>
          <text:p text:style-name="P22">Откройте свойства файла на диске <text:span text:style-name="Source_20_Text">G:</text:span> – проверьте, что он не занимает место локально.</text:p>
        </text:list-item>
        <text:list-item>
          <text:p text:style-name="P22">Откройте файл двойным щелчком – он должен скачаться и открыться в соответствующем приложении.</text:p>
        </text:list-item>
        <text:list-item>
          <text:p text:style-name="P22">После закрытия место на диске должно освободиться (настройки по умолчанию).</text:p>
        </text:list-item>
      </text:list>
      <text:h text:style-name="Heading_20_3" text:outline-level="3">Модуль 4: Интеграция с Проводником</text:h>
      <text:list text:style-name="L11">
        <text:list-item>
          <text:p text:style-name="P23">Щёлкните правой кнопкой мыши на любом файле в <text:span text:style-name="Source_20_Text">G:</text:span> – появится пункт «Google Drive» с подменю:</text:p>
          <text:list>
            <text:list-item>
              <text:p text:style-name="P23">«Поделиться»</text:p>
            </text:list-item>
            <text:list-item>
              <text:p text:style-name="P23">«Показать веб-версию»</text:p>
            </text:list-item>
            <text:list-item>
              <text:p text:style-name="P23">«Сделать доступным офлайн»</text:p>
            </text:list-item>
          </text:list>
        </text:list-item>
        <text:list-item>
          <text:p text:style-name="P23">Проверьте работу этих функций.</text:p>
        </text:list-item>
      </text:list>
      <text:h text:style-name="Heading_20_3" text:outline-level="3"><text:soft-page-break/>Модуль 5: Административные политики</text:h>
      <text:list text:style-name="L12">
        <text:list-item>
          <text:p text:style-name="P24">Убедитесь, что административные ограничения действуют.</text:p>
        </text:list-item>
        <text:list-item>
          <text:p text:style-name="P24">В консоли администратора Google Workspace проверьте логи использования Drive для данного пользователя.</text:p>
        </text:list-item>
      </text:list>
      <text:p text:style-name="Text_20_body">Если какой-либо модуль не работает, проверьте:</text:p>
      <text:list text:style-name="L13">
        <text:list-item>
          <text:p text:style-name="P25">Доступность порта 443.</text:p>
        </text:list-item>
        <text:list-item>
          <text:p text:style-name="P25">Отсутствие блокировок со стороны корпоративного файрвола или прокси.</text:p>
        </text:list-item>
        <text:list-item>
          <text:p text:style-name="P25">Правильность системного времени .</text:p>
        </text:list-item>
        <text:list-item>
          <text:p text:style-name="P25">Версию клиента .</text:p>
        </text:list-item>
      </text:list>
      <text:h text:style-name="Heading_20_2" text:outline-level="2"/>
      <text:h text:style-name="Heading_20_2" text:outline-level="2">5. Обновление программы</text:h>
      <text:h text:style-name="Heading_20_3" text:outline-level="3">5.1 Автоматическое обновление </text:h>
      <text:p text:style-name="Text_20_body">Клиент Google Drive for Desktop обновляется автоматически фоновым агентом Google Update. Обновления происходят незаметно для пользователя после перезапуска программы.</text:p>
      <text:p text:style-name="Text_20_body"><text:span text:style-name="Strong_20_Emphasis">Настройка автообновления через реестр:</text:span></text:p>
      <text:list text:style-name="L14">
        <text:list-item>
          <text:p text:style-name="P26">Отключить обновления:<text:line-break/><text:span text:style-name="Source_20_Text">HKLM\Software\Policies\Google\Update</text:span><text:line-break/>Создать DWORD <text:span text:style-name="Source_20_Text">AutoUpdateCheckPeriodMinutes</text:span> = 0</text:p>
        </text:list-item>
        <text:list-item>
          <text:p text:style-name="P26">Задать интервал проверки:<text:line-break/><text:span text:style-name="Source_20_Text">UpdatePolicy</text:span> = 1 <text:s/>или 2 </text:p>
        </text:list-item>
      </text:list>
      <text:p text:style-name="P15">Рекомендуется не отключать обновления, так как новые версии содержат исправления безопасности и улучшения совместимости.</text:p>
      <text:h text:style-name="Heading_20_3" text:outline-level="3">5.2 Ручное обновление</text:h>
      <text:p text:style-name="Text_20_body">Если автоматическое обновление отключено или требуется принудительная установка свежей версии:</text:p>
      <text:list text:style-name="L15">
        <text:list-item>
          <text:p text:style-name="P27">Завершите процесс Google Drive.</text:p>
        </text:list-item>
        <text:list-item>
          <text:p text:style-name="P27">Скачайте последний установщик с <text:a xlink:type="simple" xlink:href="https://www.google.com/drive/download/" office:target-frame-name="_blank" xlink:show="new" text:style-name="Internet_20_link" text:visited-style-name="Visited_20_Internet_20_Link">официального сайта</text:a>.</text:p>
        </text:list-item>
        <text:list-item>
          <text:p text:style-name="P27">Запустите <text:span text:style-name="Source_20_Text">GoogleDriveSetup.exe</text:span>. Программа определит существующую версию и обновит её без потери настроек пользователя.</text:p>
        </text:list-item>
        <text:list-item>
          <text:p text:style-name="P27">После обновления пользователь должен перезапустить клиент.</text:p>
        </text:list-item>
      </text:list>
      <text:h text:style-name="Heading_20_3" text:outline-level="3">5.3 Обновление через системы централизованного управления </text:h>
      <text:list text:style-name="L16">
        <text:list-item>
          <text:p text:style-name="P28">Упакуйте новый MSI/EXE-файл.</text:p>
        </text:list-item>
        <text:list-item>
          <text:p text:style-name="P28">Разверните его с параметром <text:span text:style-name="Source_20_Text">REINSTALL=ALL REINSTALLMODE=vomus</text:span> для принудительного обновления.</text:p>
        </text:list-item>
        <text:list-item>
          <text:p text:style-name="P28"><text:soft-page-break/>Предварительно завершите процесс <text:span text:style-name="Source_20_Text">GoogleDriveFS.exe</text:span> через скрипт или скрипт установки.</text:p>
        </text:list-item>
      </text:list>
      <text:h text:style-name="Heading_20_3" text:outline-level="3">5.4 Проверка версии</text:h>
      <text:p text:style-name="Text_20_body">Текущая версия клиента отображается в:</text:p>
      <text:list text:style-name="L17">
        <text:list-item>
          <text:p text:style-name="P29">Панели управления → «Установка и удаление программ» → «Google Drive».</text:p>
        </text:list-item>
        <text:list-item>
          <text:p text:style-name="P29">В клиенте: значок трея → «Настройки» → «О Google Drive».</text:p>
        </text:list-item>
      </text:list>
      <text:p text:style-name="Text_20_body">Актуальная версия всегда указана на <text:a xlink:type="simple" xlink:href="https://support.google.com/a/answer/7575144" office:target-frame-name="_blank" xlink:show="new" text:style-name="Internet_20_link" text:visited-style-name="Visited_20_Internet_20_Link">странице релизов Google</text:a>.</text:p>
      <text:p text:style-name="Text_20_body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Unifont1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" style:font-family-complex="Unifon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" style:font-family-complex="Unifon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Учетная запись Майкрософт</meta:initial-creator>
    <meta:editing-cycles>4</meta:editing-cycles>
    <meta:creation-date>2026-03-26T15:40:00</meta:creation-date>
    <dc:date>2026-05-14T13:18:35.870612248</dc:date>
    <meta:editing-duration>PT15M6S</meta:editing-duration>
    <meta:generator>LibreOffice/24.8.5.2$Linux_X86_64 LibreOffice_project/480$Build-2</meta:generator>
    <meta:document-statistic meta:table-count="2" meta:image-count="1" meta:object-count="0" meta:page-count="7" meta:paragraph-count="140" meta:word-count="1030" meta:character-count="8037" meta:non-whitespace-character-count="7196"/>
    <meta:user-defined meta:name="AppVersion">15.0000</meta:user-defined>
    <meta:template xlink:type="simple" xlink:actuate="onRequest" xlink:title="Normal" xlink:href=""/>
  </office:meta>
</office:document-meta>
</file>