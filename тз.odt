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33cm" fo:margin-left="0.072cm" table:align="left"/>
    </style:style>
    <style:style style:name="Таблица1.A" style:family="table-column">
      <style:table-column-properties style:column-width="2.999cm"/>
    </style:style>
    <style:style style:name="Таблица1.B" style:family="table-column">
      <style:table-column-properties style:column-width="6.285cm"/>
    </style:style>
    <style:style style:name="Таблица1.C" style:family="table-column">
      <style:table-column-properties style:column-width="7.65cm"/>
    </style:style>
    <style:style style:name="Таблица1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6.999cm" table:align="left"/>
    </style:style>
    <style:style style:name="Таблица2.A" style:family="table-column">
      <style:table-column-properties style:column-width="4.173cm"/>
    </style:style>
    <style:style style:name="Таблица2.B" style:family="table-column">
      <style:table-column-properties style:column-width="1.065cm"/>
    </style:style>
    <style:style style:name="Таблица2.C" style:family="table-column">
      <style:table-column-properties style:column-width="7.391cm"/>
    </style:style>
    <style:style style:name="Таблица2.D" style:family="table-column">
      <style:table-column-properties style:column-width="4.369cm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49cm" fo:border="0.05pt solid #000000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3" style:family="table">
      <style:table-properties style:width="16.956cm" fo:margin-left="0.051cm" table:align="left"/>
    </style:style>
    <style:style style:name="Таблица3.A" style:family="table-column">
      <style:table-column-properties style:column-width="0.596cm"/>
    </style:style>
    <style:style style:name="Таблица3.B" style:family="table-column">
      <style:table-column-properties style:column-width="5.445cm"/>
    </style:style>
    <style:style style:name="Таблица3.C" style:family="table-column">
      <style:table-column-properties style:column-width="2.801cm"/>
    </style:style>
    <style:style style:name="Таблица3.D" style:family="table-column">
      <style:table-column-properties style:column-width="2.755cm"/>
    </style:style>
    <style:style style:name="Таблица3.E" style:family="table-column">
      <style:table-column-properties style:column-width="2.558cm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3.E1" style:family="table-cell">
      <style:table-cell-properties style:vertical-align="middle" fo:padding="0.049cm" fo:border="0.05pt solid #000000"/>
    </style:style>
    <style:style style:name="Таблица3.E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3.F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3.18" style:family="table-row">
      <style:table-row-properties style:min-row-height="4.62cm"/>
    </style:style>
    <style:style style:name="Таблица3.F18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102ce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>
      <style:paragraph-properties fo:margin-left="1cm" fo:margin-right="1cm" fo:text-indent="0cm" style:auto-text-indent="false"/>
    </style:style>
    <style:style style:name="P9" style:family="paragraph" style:parent-style-name="Text_20_body" style:list-style-name="L5">
      <style:paragraph-properties fo:margin-left="1cm" fo:margin-right="1cm" fo:text-indent="0cm" style:auto-text-indent="false"/>
    </style:style>
    <style:style style:name="P10" style:family="paragraph" style:parent-style-name="Text_20_body" style:list-style-name="L6">
      <style:paragraph-properties fo:margin-left="1cm" fo:margin-right="1cm" fo:text-indent="0cm" style:auto-text-indent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1">
      <style:text-properties officeooo:paragraph-rsid="00126f6d"/>
    </style:style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5">
      <style:text-properties officeooo:paragraph-rsid="00126f6d"/>
    </style:style>
    <style:style style:name="P22" style:family="paragraph" style:parent-style-name="Text_20_body" style:list-style-name="L15">
      <style:text-properties officeooo:rsid="00126f6d" officeooo:paragraph-rsid="00126f6d"/>
    </style:style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Heading_20_2">
      <style:paragraph-properties fo:break-before="page"/>
    </style:style>
    <style:style style:name="P28" style:family="paragraph" style:parent-style-name="Table_20_Heading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ize="10pt" fo:font-weight="normal" officeooo:rsid="0014523a" officeooo:paragraph-rsid="0014523a" style:font-size-asian="10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02cee"/>
    </style:style>
    <style:style style:name="T3" style:family="text">
      <style:text-properties officeooo:rsid="00113dfa"/>
    </style:style>
    <style:style style:name="T4" style:family="text">
      <style:text-properties officeooo:rsid="00126f6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Drop_20_Caps" text:bullet-char="∘">
        <style:list-level-properties text:space-before="2.002cm" text:min-label-width="0.499cm"/>
        <style:text-properties style:font-name="OpenSymbol2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text:bullet-char="∘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ТЕХНИЧЕСКОЕ ЗАДАНИЕ НА ПРОГРАММНЫЙ ПРОДУКТ</text:span></text:span></text:p>
      <text:p text:style-name="P1"><text:span text:style-name="Strong_20_Emphasis"><text:span text:style-name="T1"/></text:span></text:p>
      <text:p text:style-name="Text_20_body"><text:span text:style-name="Strong_20_Emphasis">Введение</text:span></text:p>
      <text:p text:style-name="Text_20_body"><text:span text:style-name="Strong_20_Emphasis"/></text:p>
      <text:p text:style-name="P2">Наименование программного продукта: <text:span text:style-name="Strong_20_Emphasis">«Decorative Elements Composer» – аддон для Blender</text:span>.</text:p>
      <text:p text:style-name="P2">Краткая характеристика области применения: аддон предназначен для использования в системе трёхмерного моделирования Blender версии <text:span text:style-name="T2">5</text:span>.<text:span text:style-name="T2">1 </text:span>с целью автоматизации процесса расстановки декоративных элементов вдоль кривых. Область применения – создание сложных орнаментов, барельефов, декоративных панелей, повторяющихся структур. Объект использования – сцена Blender.</text:p>
      <text:p text:style-name="P2"/>
      <text:p text:style-name="Text_20_body"><text:span text:style-name="Strong_20_Emphasis">1. Основания для разработки</text:span></text:p>
      <text:list text:style-name="L1">
        <text:list-item>
          <text:p text:style-name="P3">Документ, на основании которого ведётся разработка: <text:span text:style-name="Strong_20_Emphasis">Техническое задание («</text:span><text:span text:style-name="Strong_20_Emphasis"><text:span text:style-name="T2">Записки сумашедшего»</text:span></text:span><text:span text:style-name="Strong_20_Emphasis">)</text:span>, уточнённое в процессе проектирования.</text:p>
        </text:list-item>
        <text:list-item>
          <text:p text:style-name="P3">Организация, утвердившая документ: <text:span text:style-name="Emphasis">(</text:span><text:span text:style-name="Emphasis"><text:span text:style-name="T2">ГПБОУРХХПК</text:span></text:span><text:span text:style-name="Emphasis">)</text:span>, дата утверждения: <text:span text:style-name="Emphasis">(</text:span><text:span text:style-name="Emphasis"><text:span text:style-name="T2">01.04.2026</text:span></text:span><text:span text:style-name="Emphasis">)</text:span>.</text:p>
        </text:list-item>
        <text:list-item>
          <text:p text:style-name="P3">Наименование темы разработки: <text:span text:style-name="Strong_20_Emphasis">«Разработка аддона для Blender для композиции декоративных элементов вдоль кривых»</text:span>.</text:p>
        </text:list-item>
      </text:list>
      <text:p text:style-name="Text_20_body"><text:span text:style-name="Strong_20_Emphasis"/></text:p>
      <text:p text:style-name="Text_20_body"><text:span text:style-name="Strong_20_Emphasis">2. Назначение разработки</text:span></text:p>
      <text:p text:style-name="Text_20_body"><text:span text:style-name="Strong_20_Emphasis">Функциональное назначение</text:span> – реализация интерактивного инструмента внутри Blender, позволяющего:</text:p>
      <text:list text:style-name="L2">
        <text:list-item>
          <text:p text:style-name="P4">быстро назначать кривую-носитель;</text:p>
        </text:list-item>
        <text:list-item>
          <text:p text:style-name="P4">назначать объекты-заполнители для размещения на каждой точке кривой и между точками по направлению вектора;</text:p>
        </text:list-item>
        <text:list-item>
          <text:p text:style-name="P5">управлять параметрами кривой: </text:p>
          <text:list>
            <text:list-item>
              <text:p text:style-name="P5">тип векторов</text:p>
            </text:list-item>
            <text:list-item>
              <text:p text:style-name="P5">количество сегментов</text:p>
            </text:list-item>
            <text:list-item>
              <text:p text:style-name="P5">слияние вершин по расстоянию</text:p>
            </text:list-item>
          </text:list>
        </text:list-item>
        <text:list-item>
          <text:p text:style-name="P4">гибко регулировать масштаб и поворот объектов как синхронно, так и с элементами рандомизации, без необходимости ручного копирования и трансформации.</text:p>
        </text:list-item>
      </text:list>
      <text:p text:style-name="Text_20_body"><text:span text:style-name="Strong_20_Emphasis">Эксплуатационное назначение</text:span> – снижение временных затрат на создание сложных декоративных композиций в 3D-моделировании, минимизация рутинных операций, повышение удобства работы художника/дизайнера.</text:p>
      <text:p text:style-name="Text_20_body"><text:span text:style-name="Strong_20_Emphasis"/></text:p>
      <text:p text:style-name="Text_20_body"><text:span text:style-name="Strong_20_Emphasis">3. Состав выполняемых функций</text:span></text:p>
      <text:p text:style-name="Text_20_body">Аддон должен выполнять следующий набор функций:</text:p>
      <text:list text:style-name="L3">
        <text:list-item>
          <text:p text:style-name="P6"><text:span text:style-name="Strong_20_Emphasis">Выбор кривой-носителя</text:span>:</text:p>
          <text:list>
            <text:list-item>
              <text:p text:style-name="P6">С помощью пипетки выбрать кривую в сцене.</text:p>
            </text:list-item>
          </text:list>
        </text:list-item>
        <text:list-item>
          <text:p text:style-name="P6"><text:span text:style-name="Strong_20_Emphasis">Выбор объекта-элемента</text:span>:</text:p>
          <text:list>
            <text:list-item>
              <text:p text:style-name="P6"><text:soft-page-break/>Пипеткой выбрать объект, который будет повторяться на каждой контрольной точке кривой.</text:p>
            </text:list-item>
          </text:list>
        </text:list-item>
        <text:list-item>
          <text:p text:style-name="P6"><text:span text:style-name="Strong_20_Emphasis">Выбор объекта-элемента</text:span>:</text:p>
          <text:list>
            <text:list-item>
              <text:p text:style-name="P6">Пипеткой выбрать объект, который будет размещаться по направлению ребра кривой.</text:p>
            </text:list-item>
          </text:list>
        </text:list-item>
        <text:list-item>
          <text:p text:style-name="P6"><text:span text:style-name="Strong_20_Emphasis">Управление видом векторов точек кривой</text:span>:</text:p>
          <text:list>
            <text:list-item>
              <text:p text:style-name="P6">Кнопка переключения между режимами <text:span text:style-name="Strong_20_Emphasis">Poly</text:span> и <text:span text:style-name="Strong_20_Emphasis">Bezier</text:span> для всех выбранных точек кривой.</text:p>
            </text:list-item>
          </text:list>
        </text:list-item>
        <text:list-item>
          <text:p text:style-name="P6"><text:span text:style-name="Strong_20_Emphasis">Управление дискретизацией кривой</text:span>:</text:p>
          <text:list>
            <text:list-item>
              <text:p text:style-name="P6">Поле ввода «Количество разделений» для задания числа интерполяционных сегментов между исходными точками кривой.</text:p>
            </text:list-item>
          </text:list>
        </text:list-item>
        <text:list-item>
          <text:p text:style-name="P6"><text:span text:style-name="Strong_20_Emphasis">Слияние вершин кривой</text:span>:</text:p>
          <text:list>
            <text:list-item>
              <text:p text:style-name="P6">Check-box «Включить Merge by Distance».</text:p>
            </text:list-item>
            <text:list-item>
              <text:p text:style-name="P6">Ползунок для задания порогового расстояния слияния.</text:p>
            </text:list-item>
          </text:list>
        </text:list-item>
        <text:list-item>
          <text:p text:style-name="P6"><text:span text:style-name="Strong_20_Emphasis">Управление видимостью объектов</text:span>:</text:p>
          <text:list>
            <text:list-item>
              <text:p text:style-name="P6">Check-box для скрытия/отображения Point Object.</text:p>
            </text:list-item>
            <text:list-item>
              <text:p text:style-name="P6">Check-box для скрытия/отображения Edge Object.</text:p>
            </text:list-item>
          </text:list>
        </text:list-item>
        <text:list-item>
          <text:p text:style-name="P6"><text:span text:style-name="Strong_20_Emphasis">Управление масштабированием рёбер кривой</text:span>:</text:p>
          <text:list>
            <text:list-item>
              <text:p text:style-name="P6">Check-box «Синхронное/асинхронное уменьшение рёбер».</text:p>
            </text:list-item>
            <text:list-item>
              <text:p text:style-name="P6">Два ползунка для уменьшения левой/правой половины ребра.</text:p>
            </text:list-item>
          </text:list>
        </text:list-item>
        <text:list-item>
          <text:p text:style-name="P6"><text:span text:style-name="Strong_20_Emphasis">Выбор режима работы из выпадающего списка</text:span>:</text:p>
          <text:list>
            <text:list-item>
              <text:p text:style-name="P6">Пункты:</text:p>
              <text:list>
                <text:list-item>
                  <text:p text:style-name="P6">«Работа с кривой»</text:p>
                </text:list-item>
                <text:list-item>
                  <text:p text:style-name="P6">«Параметры Point Object»</text:p>
                </text:list-item>
                <text:list-item>
                  <text:p text:style-name="P6">«Параметры Edge Object»</text:p>
                </text:list-item>
              </text:list>
            </text:list-item>
          </text:list>
        </text:list-item>
        <text:list-item>
          <text:p text:style-name="P6"><text:span text:style-name="Strong_20_Emphasis">Блок регулирования размера объектов</text:span>:</text:p>
          <text:list>
            <text:list-item>
              <text:p text:style-name="P6">Базовый ползунок общего масштаба.</text:p>
            </text:list-item>
            <text:list-item>
              <text:p text:style-name="P6">Рандомайзер: минимальное и максимальное значение масштаба.</text:p>
            </text:list-item>
          </text:list>
        </text:list-item>
        <text:list-item>
          <text:p text:style-name="P6"><text:span text:style-name="Strong_20_Emphasis">Блок регулирования поворота объектов</text:span>:</text:p>
          <text:list>
            <text:list-item>
              <text:p text:style-name="P6">Базовый ползунок для угла поворота.</text:p>
            </text:list-item>
            <text:list-item>
              <text:p text:style-name="P6">Рандомайзер: минимальный и максимальный угол.</text:p>
            </text:list-item>
            <text:list-item>
              <text:p text:style-name="P6"/>
            </text:list-item>
          </text:list>
        </text:list-item>
      </text:list>
      <text:p text:style-name="Text_20_body"><text:span text:style-name="Strong_20_Emphasis">4. Требования к программе или программному изделию</text:span></text:p>
      <text:h text:style-name="Heading_20_3" text:outline-level="3"><text:span text:style-name="Strong_20_Emphasis">4.1. Требования к функциональным характеристикам</text:span></text:h>
      <text:p text:style-name="Text_20_body"><text:span text:style-name="Strong_20_Emphasis">Внешняя среда</text:span>: аддон работает внутри Blender <text:span text:style-name="T3">5</text:span>.x.</text:p>
      <text:p text:style-name="Text_20_body"><text:span text:style-name="Strong_20_Emphasis">Специальные требования к аппаратной и операционной платформам</text:span>: полностью соответствуют системным требованиям Blender для соответствующей версии.</text:p>
      <text:p text:style-name="Text_20_body"><text:span text:style-name="Strong_20_Emphasis">Организация входных и выходных данных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ext:soft-page-break/>
          <table:table-row>
            <table:table-cell table:style-name="Таблица1.A1" office:value-type="string">
              <text:p text:style-name="Table_20_Heading">Тип данных</text:p>
            </table:table-cell>
            <table:table-cell table:style-name="Таблица1.A1" office:value-type="string">
              <text:p text:style-name="Table_20_Heading">Описание</text:p>
            </table:table-cell>
            <table:table-cell table:style-name="Таблица1.C1" office:value-type="string">
              <text:p text:style-name="Table_20_Heading">Требования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Входные: выбор кривой</text:p>
          </table:table-cell>
          <table:table-cell table:style-name="Таблица1.A2" office:value-type="string">
            <text:p text:style-name="Table_20_Contents">Пипеткой из 3D Viewport</text:p>
          </table:table-cell>
          <table:table-cell table:style-name="Таблица1.C2" office:value-type="string">
            <text:p text:style-name="Table_20_Contents">После выбора – в аддоне отображается имя кривой, кривая подсвечивается.</text:p>
          </table:table-cell>
        </table:table-row>
        <table:table-row>
          <table:table-cell table:style-name="Таблица1.A2" office:value-type="string">
            <text:p text:style-name="Table_20_Contents">Входные: выбор объекта</text:p>
          </table:table-cell>
          <table:table-cell table:style-name="Таблица1.A2" office:value-type="string">
            <text:p text:style-name="Table_20_Contents">Пипеткой из 3D Viewport</text:p>
          </table:table-cell>
          <table:table-cell table:style-name="Таблица1.C2" office:value-type="string">
            <text:p text:style-name="Table_20_Contents">Разрешается выбор мешей, кривых, пустышек. Контроль: объект существует в сцене.</text:p>
          </table:table-cell>
        </table:table-row>
        <table:table-row>
          <table:table-cell table:style-name="Таблица1.A2" office:value-type="string">
            <text:p text:style-name="Table_20_Contents">Входные: числовые поля</text:p>
          </table:table-cell>
          <table:table-cell table:style-name="Таблица1.A2" office:value-type="string">
            <text:p text:style-name="Table_20_Contents">Количество разделений</text:p>
          </table:table-cell>
          <table:table-cell table:style-name="Таблица1.C2" office:value-type="string">
            <text:p text:style-name="Table_20_Contents">Проверка на положительное целое. По умолчанию 10.</text:p>
          </table:table-cell>
        </table:table-row>
        <table:table-row>
          <table:table-cell table:style-name="Таблица1.A2" office:value-type="string">
            <text:p text:style-name="Table_20_Contents">Входные: ползунки</text:p>
          </table:table-cell>
          <table:table-cell table:style-name="Таблица1.A2" office:value-type="string">
            <text:p text:style-name="Table_20_Contents">Merge distance</text:p>
          </table:table-cell>
          <table:table-cell table:style-name="Таблица1.C2" office:value-type="string">
            <text:p text:style-name="Table_20_Contents">Шаг 0.001.</text:p>
          </table:table-cell>
        </table:table-row>
        <table:table-row>
          <table:table-cell table:style-name="Таблица1.A2" office:value-type="string">
            <text:p text:style-name="Table_20_Contents">Входные: ползунки масштаба ребра</text:p>
          </table:table-cell>
          <table:table-cell table:style-name="Таблица1.A2" office:value-type="string">
            <text:p text:style-name="Table_20_Contents">0.0 – 1.0</text:p>
          </table:table-cell>
          <table:table-cell table:style-name="Таблица1.C2" office:value-type="string">
            <text:p text:style-name="Table_20_Contents">Шаг 0.01.</text:p>
          </table:table-cell>
        </table:table-row>
        <table:table-row>
          <table:table-cell table:style-name="Таблица1.A2" office:value-type="string">
            <text:p text:style-name="Table_20_Contents">Входные: рандомайзер масштаба</text:p>
          </table:table-cell>
          <table:table-cell table:style-name="Таблица1.A2" office:value-type="string">
            <text:p text:style-name="Table_20_Contents">Min/Max</text:p>
          </table:table-cell>
          <table:table-cell table:style-name="Таблица1.C2" office:value-type="string">
            <text:p text:style-name="Table_20_Contents">Min ≤ Max.</text:p>
          </table:table-cell>
        </table:table-row>
        <table:table-row>
          <table:table-cell table:style-name="Таблица1.A2" office:value-type="string">
            <text:p text:style-name="Table_20_Contents">Выходные данные</text:p>
          </table:table-cell>
          <table:table-cell table:style-name="Таблица1.A2" office:value-type="string">
            <text:p text:style-name="Table_20_Contents">Модифицированная кривая и порождённые объекты-копии</text:p>
          </table:table-cell>
          <table:table-cell table:style-name="Таблица1.C2" office:value-type="string">
            <text:p text:style-name="Table_20_Contents">Объекты не нарушают иерархию сцены. При изменении параметров – автоматическое обновление.</text:p>
          </table:table-cell>
        </table:table-row>
      </table:table>
      <text:p text:style-name="Text_20_body"><text:span text:style-name="Strong_20_Emphasis">Временные характеристики</text:span>:</text:p>
      <text:list text:style-name="L4">
        <text:list-item>
          <text:p text:style-name="P7">Время перестроения композиции для кривой с ≤ 1000 итоговых точек – <text:span text:style-name="Strong_20_Emphasis">не более 0.5 секунд</text:span>.</text:p>
        </text:list-item>
        <text:list-item>
          <text:p text:style-name="P7">Реакция на изменение ползунка/чека – <text:span text:style-name="Strong_20_Emphasis">немедленное обновление</text:span> или с задержкой не более 0.3 с.</text:p>
        </text:list-item>
      </text:list>
      <text:p text:style-name="Text_20_body"><text:span text:style-name="Strong_20_Emphasis">Пример оформления:</text:span></text:p>
      <text:p text:style-name="P8">Проектная задача: Пользователь создаёт сцену с изогнутой кривой. Аддон должен разместить декоративные элементы в каждой точке кривой и дополнительные элементы по рёбрам между точками.<text:line-break/><text:span text:style-name="Strong_20_Emphasis">Входные данные</text:span>:</text:p>
      <text:list text:style-name="L5">
        <text:list-item>
          <text:p text:style-name="P9">Кривая.</text:p>
        </text:list-item>
        <text:list-item>
          <text:p text:style-name="P9">Объект Point Object.</text:p>
        </text:list-item>
        <text:list-item>
          <text:p text:style-name="P9">Объект Edge Object.</text:p>
        </text:list-item>
        <text:list-item>
          <text:p text:style-name="P9">Количество разделений кривой.</text:p>
        </text:list-item>
        <text:list-item>
          <text:p text:style-name="P9">Порог Merge by distance.</text:p>
        </text:list-item>
        <text:list-item>
          <text:p text:style-name="P9">Параметры масштаба и поворота.<text:line-break/><text:span text:style-name="Strong_20_Emphasis">Требования к входным данным</text:span>:</text:p>
        </text:list-item>
      </text:list>
      <text:list text:style-name="L6">
        <text:list-item>
          <text:p text:style-name="P10">При выборе пипеткой неверного типа – выдать предупреждение «Выбран неверный тип: требуется кривая».</text:p>
        </text:list-item>
        <text:list-item>
          <text:p text:style-name="P10">При вводе числа разделений меньше 1 – установить значение 1 с уведомлением.</text:p>
        </text:list-item>
        <text:list-item>
          <text:p text:style-name="P10">При Min &gt; Max в рандомайзере масштаба – поменять их местами или выдать ошибку.</text:p>
        </text:list-item>
        <text:list-item>
          <text:p text:style-name="P10">Контроль совместимости: все объекты должны находиться в активной сцене, не быть удалёнными.<text:line-break/><text:span text:style-name="Strong_20_Emphasis">Выходные данные</text:span>:</text:p>
        </text:list-item>
        <text:list-item>
          <text:p text:style-name="P10"><text:soft-page-break/>Модифицированная кривая и набор дубликатов объектов, привязанных к точкам и рёбрам.</text:p>
        </text:list-item>
        <text:list-item>
          <text:p text:style-name="P10">Возможность отключения видимости Point Object и Edge Object через Check-box без удаления из сцены.</text:p>
        </text:list-item>
      </text:list>
      <text:h text:style-name="Heading_20_3" text:outline-level="3"><text:span text:style-name="Strong_20_Emphasis">4.2. Требования к надежности</text:span></text:h>
      <text:list text:style-name="L7">
        <text:list-item>
          <text:p text:style-name="P11">Аддон не должен приводить к вылету Blender при любых допустимых и недопустимых действиях пользователя.</text:p>
        </text:list-item>
        <text:list-item>
          <text:p text:style-name="P11">При удалении исходной кривой или объектов из сцены – аддон должен перейти в состояние ожидания нового выбора, а не генерировать ошибки доступа.</text:p>
        </text:list-item>
        <text:list-item>
          <text:p text:style-name="P11">Контроль входных данных: перед генерацией композиции проверять существование кривой и объектов.</text:p>
        </text:list-item>
        <text:list-item>
          <text:p text:style-name="P11">Время восстановления после нештатной ситуации – немедленное с уведомлением в UI.</text:p>
        </text:list-item>
        <text:list-item>
          <text:p text:style-name="P11">Аддон должен поддерживать операцию <text:span text:style-name="Strong_20_Emphasis">Undo</text:span> на уровне Blender.</text:p>
        </text:list-item>
      </text:list>
      <text:h text:style-name="Heading_20_3" text:outline-level="3"><text:span text:style-name="Strong_20_Emphasis">4.3. Условия эксплуатации</text:span></text:h>
      <text:list text:style-name="L8">
        <text:list-item>
          <text:p text:style-name="P12">Пользователь – 3D-художник или дизайнер, не обязательно знакомый с программированием, но обладающий базовыми навыками работы в Blender.</text:p>
        </text:list-item>
        <text:list-item>
          <text:p text:style-name="P12">Интерфейс аддона должен быть организован в виде панели в <text:span text:style-name="Strong_20_Emphasis">3D Viewport → Sidebar</text:span>.</text:p>
        </text:list-item>
        <text:list-item>
          <text:p text:style-name="P12">Количество манипуляций – минимальное: выбор пипеткой, регулировка ползунков, чек-боксы.</text:p>
        </text:list-item>
        <text:list-item>
          <text:p text:style-name="P12">Реакция на неверные действия: игнорирование операции с выводом сообщения в строку состояния Blender.</text:p>
        </text:list-item>
        <text:list-item>
          <text:p text:style-name="P12">Эстетические требования: тёмная цветовая гамма, соответствующая стандартной теме Blender; компактное расположение элементов; всплывающие подсказки для каждого поля.</text:p>
        </text:list-item>
      </text:list>
      <text:h text:style-name="Heading_20_3" text:outline-level="3"><text:span text:style-name="Strong_20_Emphasis">4.4. Требования к составу и параметрам технических средств</text:span></text:h>
      <text:p text:style-name="Text_20_body">Минимальные требования совпадают с требованиями Blender <text:span text:style-name="T3">5</text:span>.x:</text:p>
      <text:list text:style-name="L9">
        <text:list-item>
          <text:p text:style-name="P13">CPU: 64-bit с поддержкой SSE2.</text:p>
        </text:list-item>
        <text:list-item>
          <text:p text:style-name="P13">ОЗУ: от 4 ГБ.</text:p>
        </text:list-item>
        <text:list-item>
          <text:p text:style-name="P13">Видеокарта: с поддержкой OpenGL 3.3.</text:p>
        </text:list-item>
        <text:list-item>
          <text:p text:style-name="P13">Дисковое пространство: менее 1 МБ для самого аддона.</text:p>
        </text:list-item>
        <text:list-item>
          <text:p text:style-name="P13">Операционная система: Windows <text:span text:style-name="T3">7</text:span>, macOS, Linux-<text:span text:style-name="T3">x64</text:span>.</text:p>
        </text:list-item>
      </text:list>
      <text:h text:style-name="Heading_20_3" text:outline-level="3"><text:span text:style-name="Strong_20_Emphasis">4.5. Требования к информационной и программной совместимости</text:span></text:h>
      <text:list text:style-name="L10">
        <text:list-item>
          <text:p text:style-name="P14">Аддон разрабатывается на <text:span text:style-name="Strong_20_Emphasis">Python 3.1</text:span><text:span text:style-name="Strong_20_Emphasis"><text:span text:style-name="T3">2</text:span></text:span><text:span text:style-name="Strong_20_Emphasis">+</text:span> с использованием <text:span text:style-name="Strong_20_Emphasis">Blender API</text:span>.</text:p>
        </text:list-item>
        <text:list-item>
          <text:p text:style-name="P14">Исходные коды должны быть поставляться в виде <text:span text:style-name="Source_20_Text">.py</text:span> файла или zip-пакета с поддержкой установки через <text:span text:style-name="Source_20_Text">Edit → Preferences → Add-ons → Install</text:span>.</text:p>
        </text:list-item>
        <text:list-item>
          <text:p text:style-name="P14">Не использовать внешние библиотеки, не входящие в стандартную поставку Blender.</text:p>
        </text:list-item>
        <text:list-item>
          <text:p text:style-name="P14">Информационные структуры: хранение ссылок на объекты через <text:soft-page-break/><text:span text:style-name="Source_20_Text">bpy.types.Object</text:span>, работа с кривыми через <text:span text:style-name="Source_20_Text">bpy.types.Curve</text:span>.</text:p>
        </text:list-item>
        <text:list-item>
          <text:p text:style-name="P14">Выбранный объект Point/Edge должен сохраняться в свойствах сцены или в свойствах аддона.</text:p>
        </text:list-item>
      </text:list>
      <text:h text:style-name="Heading_20_3" text:outline-level="3"><text:span text:style-name="Strong_20_Emphasis">4.6. Требования к маркировке и упаковке</text:span></text:h>
      <text:list text:style-name="L11">
        <text:list-item>
          <text:p text:style-name="P15">Поставляемый архив должен иметь имя: <text:span text:style-name="Source_20_Text"><text:span text:style-name="T4">D.E.C.</text:span></text:span>.</text:p>
        </text:list-item>
        <text:list-item>
          <text:p text:style-name="P16">Внутри архива: папка <text:span text:style-name="Source_20_Text"><text:span text:style-name="T4">D.E.C.</text:span></text:span>, содержащая <text:span text:style-name="Source_20_Text">__init__.py</text:span> и при необходимости другие модули.</text:p>
        </text:list-item>
        <text:list-item>
          <text:p text:style-name="P15">Файл <text:span text:style-name="Source_20_Text">__init__.py</text:span> должен содержать метаданные: <text:span text:style-name="Source_20_Text">bl_info</text:span> (имя, автор, версия, описание, категория).</text:p>
        </text:list-item>
      </text:list>
      <text:h text:style-name="Heading_20_3" text:outline-level="3"><text:span text:style-name="Strong_20_Emphasis">4.7. Требования к транспортированию и хранению</text:span></text:h>
      <text:list text:style-name="L12">
        <text:list-item>
          <text:p text:style-name="P17">Распространение через цифровые каналы (GitHub, Blender Market).</text:p>
        </text:list-item>
        <text:list-item>
          <text:p text:style-name="P17">Хранение на любых носителях без специальных условий.</text:p>
        </text:list-item>
        <text:list-item>
          <text:p text:style-name="P17">Срок хранения не ограничен.</text:p>
        </text:list-item>
      </text:list>
      <text:h text:style-name="Heading_20_3" text:outline-level="3"><text:span text:style-name="Strong_20_Emphasis">4.8. Специальные требования</text:span></text:h>
      <text:list text:style-name="L13">
        <text:list-item>
          <text:p text:style-name="P18">Поддержка работы как с <text:span text:style-name="Strong_20_Emphasis">кривыми Безье</text:span>, так и с <text:span text:style-name="Strong_20_Emphasis">NURBS-кривыми</text:span>.</text:p>
        </text:list-item>
        <text:list-item>
          <text:p text:style-name="P18">Возможность «запекания» результата: кнопка «Преобразовать в меш» – создание единого меш-объекта из всех размещённых экземпляров.</text:p>
        </text:list-item>
      </text:list>
      <text:p text:style-name="Text_20_body"><text:span text:style-name="Strong_20_Emphasis"/></text:p>
      <text:p text:style-name="Text_20_body"><text:span text:style-name="Strong_20_Emphasis">5. Требования к программной документации</text:span></text:p>
      <text:p text:style-name="Text_20_body">Должна быть разработана следующая эксплуатационная документация:</text:p>
      <text:list text:style-name="L14">
        <text:list-item>
          <text:p text:style-name="P19"><text:span text:style-name="Strong_20_Emphasis">Руководство пользователя</text:span>.</text:p>
        </text:list-item>
        <text:list-item>
          <text:p text:style-name="P19"><text:span text:style-name="Strong_20_Emphasis">Описание установки и удаления аддона</text:span>.</text:p>
        </text:list-item>
        <text:list-item>
          <text:p text:style-name="P19"><text:span text:style-name="Strong_20_Emphasis">Примечания по совместимости</text:span>.</text:p>
        </text:list-item>
        <text:list-item>
          <text:p text:style-name="P19"><text:span text:style-name="Strong_20_Emphasis">Краткая справка по API</text:span>.</text:p>
        </text:list-item>
      </text:list>
      <text:p text:style-name="Text_20_body"><text:span text:style-name="Strong_20_Emphasis"/></text:p>
      <text:p text:style-name="Text_20_body"><text:span text:style-name="Strong_20_Emphasis">6. Технико-экономические показатели</text:span></text:p>
      <text:list text:style-name="L15">
        <text:list-item>
          <text:p text:style-name="P20">Ориентировочная экономическая эффективность: сокращение времени на компоновку сложного декора до 80% по сравнению с ручным копированием/размещением.</text:p>
        </text:list-item>
        <text:list-item>
          <text:p text:style-name="P20">Предполагаемая годовая потребность – для индивидуальных 3D-художников и студий, работающих в области архитектурной визуализации, геймдева, индустриального дизайна.</text:p>
        </text:list-item>
        <text:list-item>
          <text:p text:style-name="P21">Экономические преимущества по сравнению с аналогами:</text:p>
          <text:list>
            <text:list-item>
              <text:p text:style-name="P21"><text:s/>более высокая гибкость</text:p>
            </text:list-item>
            <text:list-item>
              <text:p text:style-name="P22">меньшие технические требования 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7. Стадии и этапы разработк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ext:soft-page-break/>
          <table:table-row>
            <table:table-cell table:style-name="Таблица2.A1" office:value-type="string">
              <text:p text:style-name="Table_20_Heading">Стадия</text:p>
            </table:table-cell>
            <table:table-cell table:style-name="Таблица2.A1" office:value-type="string">
              <text:p text:style-name="Table_20_Heading">Этап</text:p>
            </table:table-cell>
            <table:table-cell table:style-name="Таблица2.A1" office:value-type="string">
              <text:p text:style-name="Table_20_Heading">Содержание работ</text:p>
            </table:table-cell>
            <table:table-cell table:style-name="Таблица2.D1" office:value-type="string">
              <text:p text:style-name="Table_20_Heading">Срок</text:p>
            </table:table-cell>
          </table:table-row>
        </table:table-header-rows>
        <table:table-row>
          <table:table-cell table:style-name="Таблица2.A2" office:value-type="string">
            <text:p text:style-name="Table_20_Contents">1. Техническое задание</text:p>
          </table:table-cell>
          <table:table-cell table:style-name="Таблица2.A2" office:value-type="string">
            <text:p text:style-name="Table_20_Contents">1.1</text:p>
          </table:table-cell>
          <table:table-cell table:style-name="Таблица2.A2" office:value-type="string">
            <text:p text:style-name="Table_20_Contents">Разработка и утверждение ТЗ</text:p>
          </table:table-cell>
          <table:table-cell table:style-name="Таблица2.D2" office:value-type="string">
            <text:p text:style-name="Table_20_Contents">1 день</text:p>
          </table:table-cell>
        </table:table-row>
        <table:table-row>
          <table:table-cell table:style-name="Таблица2.A2" office:value-type="string">
            <text:p text:style-name="Table_20_Contents">2. Разработка прототипа</text:p>
          </table:table-cell>
          <table:table-cell table:style-name="Таблица2.A2" office:value-type="string">
            <text:p text:style-name="Table_20_Contents">2.1</text:p>
          </table:table-cell>
          <table:table-cell table:style-name="Таблица2.A2" office:value-type="string">
            <text:p text:style-name="Table_20_Contents">Реализация базового функционала</text:p>
          </table:table-cell>
          <table:table-cell table:style-name="Таблица2.D2" office:value-type="string">
            <text:p text:style-name="Table_20_Contents"><text:span text:style-name="T4">12</text:span> дня</text:p>
          </table:table-cell>
        </table:table-row>
        <table:table-row>
          <table:table-cell table:style-name="Таблица2.A2" office:value-type="string">
            <text:p text:style-name="Table_20_Contents">3. Расширение функционала</text:p>
          </table:table-cell>
          <table:table-cell table:style-name="Таблица2.A2" office:value-type="string">
            <text:p text:style-name="Table_20_Contents">3.1</text:p>
          </table:table-cell>
          <table:table-cell table:style-name="Таблица2.A2" office:value-type="string">
            <text:p text:style-name="Table_20_Contents">Добавление Edge Object, рандомайзеров, Merge by distance, UI-панели</text:p>
          </table:table-cell>
          <table:table-cell table:style-name="Таблица2.D2" office:value-type="string">
            <text:p text:style-name="Table_20_Contents">5 дней</text:p>
          </table:table-cell>
        </table:table-row>
        <table:table-row>
          <table:table-cell table:style-name="Таблица2.A2" office:value-type="string">
            <text:p text:style-name="Table_20_Contents">4. Тестирование</text:p>
          </table:table-cell>
          <table:table-cell table:style-name="Таблица2.A2" office:value-type="string">
            <text:p text:style-name="Table_20_Contents">4.1</text:p>
          </table:table-cell>
          <table:table-cell table:style-name="Таблица2.A2" office:value-type="string">
            <text:p text:style-name="Table_20_Contents">Альфа-тестирование в Blender, отладка</text:p>
          </table:table-cell>
          <table:table-cell table:style-name="Таблица2.D2" office:value-type="string">
            <text:p text:style-name="Table_20_Contents">2 дня</text:p>
          </table:table-cell>
        </table:table-row>
        <table:table-row>
          <table:table-cell table:style-name="Таблица2.A2" office:value-type="string">
            <text:p text:style-name="Table_20_Contents">5. Документирование</text:p>
          </table:table-cell>
          <table:table-cell table:style-name="Таблица2.A2" office:value-type="string">
            <text:p text:style-name="Table_20_Contents">5.1</text:p>
          </table:table-cell>
          <table:table-cell table:style-name="Таблица2.A2" office:value-type="string">
            <text:p text:style-name="Table_20_Contents">Написание руководства, подготовка к релизу</text:p>
          </table:table-cell>
          <table:table-cell table:style-name="Таблица2.D2" office:value-type="string">
            <text:p text:style-name="Table_20_Contents"><text:span text:style-name="T4">7</text:span> дня</text:p>
          </table:table-cell>
        </table:table-row>
        <table:table-row>
          <table:table-cell table:style-name="Таблица2.A2" office:value-type="string">
            <text:p text:style-name="Table_20_Contents">6. Приемка</text:p>
          </table:table-cell>
          <table:table-cell table:style-name="Таблица2.A2" office:value-type="string">
            <text:p text:style-name="Table_20_Contents">6.1</text:p>
          </table:table-cell>
          <table:table-cell table:style-name="Таблица2.A2" office:value-type="string">
            <text:p text:style-name="Table_20_Contents">Финальное тестирование и сдача</text:p>
          </table:table-cell>
          <table:table-cell table:style-name="Таблица2.D2" office:value-type="string">
            <text:p text:style-name="Table_20_Contents">1 день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8. Порядок контроля и приемки</text:span></text:p>
      <text:list text:style-name="L16">
        <text:list-item>
          <text:p text:style-name="P23"><text:span text:style-name="Strong_20_Emphasis">Виды испытаний</text:span>:</text:p>
          <text:list>
            <text:list-item>
              <text:p text:style-name="P23">Функциональное тестирование всех пунктов раздела 3.</text:p>
            </text:list-item>
            <text:list-item>
              <text:p text:style-name="P23">Тестирование надёжности.</text:p>
            </text:list-item>
          </text:list>
        </text:list-item>
      </text:list>
      <text:p text:style-name="Text_20_body"><text:span text:style-name="Strong_20_Emphasis">Общие требования к приемке</text:span>:</text:p>
      <text:list text:style-name="L17">
        <text:list-item>
          <text:p text:style-name="P24">Проверка установки аддона через Preferences.</text:p>
        </text:list-item>
        <text:list-item>
          <text:p text:style-name="P24">Проверка работы пипеток выбора кривой и объектов.</text:p>
        </text:list-item>
        <text:list-item>
          <text:p text:style-name="P24">Проверка переключения Poly/Bezier – кривая должна корректно менять тип точек.</text:p>
        </text:list-item>
        <text:list-item>
          <text:p text:style-name="P24">Проверка поля «Количество разделений» – кривая разбивается на заданное число сегментов.</text:p>
        </text:list-item>
        <text:list-item>
          <text:p text:style-name="P24">Проверка Merge by distance – вершины в пределах ползунка сливаются.</text:p>
        </text:list-item>
        <text:list-item>
          <text:p text:style-name="P24">Проверка чек-боксов видимости – объекты скрываются/показываются без удаления.</text:p>
        </text:list-item>
        <text:list-item>
          <text:p text:style-name="P24">Проверка синхронного/асинхронного уменьшения рёбер – два ползунка работают связанно или раздельно.</text:p>
        </text:list-item>
        <text:list-item>
          <text:p text:style-name="P24">Проверка блоков размера и поворота с рандомайзерами – создаваемые копии имеют разные масштаб/поворот в заданных пределах.</text:p>
        </text:list-item>
        <text:list-item>
          <text:p text:style-name="P24">Операция Undo должна откатывать изменения, связанные с действиями аддона.</text:p>
        </text:list-item>
      </text:list>
      <text:p text:style-name="Text_20_body">При успешном прохождении всех пунктов аддон считается принятым.</text:p>
      <text:p text:style-name="Text_20_body"><text:span text:style-name="Strong_20_Emphasis"/></text:p>
      <text:p text:style-name="Text_20_body"><text:span text:style-name="Strong_20_Emphasis">9. Требования к составу и содержанию работ по внедрению ПС в эксплуатацию</text:span></text:p>
      <text:list text:style-name="L18">
        <text:list-item>
          <text:p text:style-name="P25">Распространение в виде zip-архива.</text:p>
        </text:list-item>
        <text:list-item>
          <text:p text:style-name="P25">Внедрение осуществляется конечным пользователем через штатный механизм установки аддонов Blender.</text:p>
        </text:list-item>
        <text:list-item>
          <text:p text:style-name="P25">Автоматическая настройка: после установки аддон появляется в панели 3D Viewport.</text:p>
        </text:list-item>
        <text:list-item>
          <text:p text:style-name="P25">Не требуется специального обучения – достаточно встроенных подсказок и краткой документации.</text:p>
        </text:list-item>
      </text:list>
      <text:p text:style-name="Text_20_body"><text:span text:style-name="Strong_20_Emphasis"/></text:p>
      <text:p text:style-name="Text_20_body"><text:span text:style-name="Strong_20_Emphasis">10. Предложения по применению и развитию проекта ПС</text:span></text:p>
      <text:list text:style-name="L19">
        <text:list-item>
          <text:p text:style-name="P26"><text:soft-page-break/><text:span text:style-name="Strong_20_Emphasis">Применение</text:span>: моделирование декоративных решёток, ювелирных цепочек, орнаментов, бус, гирлянд, архитектурных молдингов, кабельных трасс, трубопроводов с регулярными элементами.</text:p>
        </text:list-item>
        <text:list-item>
          <text:p text:style-name="P26"><text:span text:style-name="Strong_20_Emphasis">Развитие</text:span>:</text:p>
          <text:list>
            <text:list-item>
              <text:p text:style-name="P26">Добавление поддержки анимации изменение параметров вдоль кривой во времени.</text:p>
            </text:list-item>
            <text:list-item>
              <text:p text:style-name="P26">Поддержка вращения для каждого экземпляра в зависимости от нормали кривой.</text:p>
            </text:list-item>
            <text:list-item>
              <text:p text:style-name="P26">Интеграция с Geometry Nodes для неразрушающего редактирования.</text:p>
            </text:list-item>
            <text:list-item>
              <text:p text:style-name="P26">Возможность сохранения «пресетов» для повторного использования.</text:p>
            </text:list-item>
          </text:list>
        </text:list-item>
      </text:list>
      <text:p text:style-name="Text_20_body"><text:span text:style-name="Strong_20_Emphasis">ПРИМЕЧАНИЕ</text:span></text:p>
      <text:p text:style-name="Text_20_body">Данное техническое задание оформлено в соответствии с ГОСТ 19.106-78 формат А4. Лист утверждения и титульный лист оформляются отдельно по ГОСТ 19.104-78. Внесение изменений осуществляется путём выпуска дополнения к ТЗ с сохранением того же порядка согласования.</text:p>
      <text:p text:style-name="Standard"/>
      <text:p text:style-name="Standard"/>
      <text:p text:style-name="Standard"/>
      <text:h text:style-name="P27" text:outline-level="2">Календарный график выполнения работ</text:h>
      <text:h text:style-name="Heading_20_3" text:outline-level="3">по проекту «Decorative Elements Composer» – Аддон для Blender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C"/>
        <table:table-header-rows>
          <table:table-row>
            <table:table-cell table:style-name="Таблица3.A1" table:number-rows-spanned="2" office:value-type="string">
              <text:p text:style-name="P28">№</text:p>
            </table:table-cell>
            <table:table-cell table:style-name="Таблица3.A1" table:number-rows-spanned="2" office:value-type="string">
              <text:p text:style-name="P28">Содержание работ</text:p>
            </table:table-cell>
            <table:table-cell table:style-name="Таблица3.A1" table:number-rows-spanned="2" office:value-type="string">
              <text:p text:style-name="P28">Исполнители</text:p>
            </table:table-cell>
            <table:table-cell table:style-name="Таблица3.A1" table:number-rows-spanned="2" office:value-type="string">
              <text:p text:style-name="P28">Длительность (дн.)</text:p>
            </table:table-cell>
            <table:table-cell table:style-name="Таблица3.E1" table:number-columns-spanned="2" office:value-type="string">
              <text:p text:style-name="P28">Отметка о выполнении</text:p>
            </table:table-cell>
            <table:covered-table-cell/>
          </table:table-row>
        </table:table-header-rows>
        <table:table-row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E2" office:value-type="string">
            <text:p text:style-name="P29">Дата сдачи задания</text:p>
          </table:table-cell>
          <table:table-cell table:style-name="Таблица3.F2" office:value-type="string">
            <text:p text:style-name="P29">Подпись руководителя</text:p>
          </table:table-cell>
        </table:table-row>
        <table:table-row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>Постановка задачи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2</text:p>
          </table:table-cell>
          <table:table-cell table:style-name="Таблица3.E2" office:value-type="string">
            <text:p text:style-name="P29">Сбор исходных данных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2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3</text:p>
          </table:table-cell>
          <table:table-cell table:style-name="Таблица3.E2" office:value-type="string">
            <text:p text:style-name="P29">Анализ существующих методов решения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4</text:p>
          </table:table-cell>
          <table:table-cell table:style-name="Таблица3.E2" office:value-type="string">
            <text:p text:style-name="P29">Обоснование принципиальной важности разработки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0.5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5</text:p>
          </table:table-cell>
          <table:table-cell table:style-name="Таблица3.E2" office:value-type="string">
            <text:p text:style-name="P29">Определение требований к системе 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6</text:p>
          </table:table-cell>
          <table:table-cell table:style-name="Таблица3.E2" office:value-type="string">
            <text:p text:style-name="P29">Определение входных и выходных данных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7</text:p>
          </table:table-cell>
          <table:table-cell table:style-name="Таблица3.E2" office:value-type="string">
            <text:p text:style-name="P29">Выбор языка программирования и технологий 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0</text:p>
          </table:table-cell>
          <table:table-cell table:style-name="Таблица3.E2" office:value-type="string">
            <text:p text:style-name="P29">(фиксирован)</text:p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8</text:p>
          </table:table-cell>
          <table:table-cell table:style-name="Таблица3.E2" office:value-type="string">
            <text:p text:style-name="P29">Разработка алгоритма решения задачи: размещение объектов на точках; размещение на рёбрах; учёт Merge by distance; обработка рандомайзеров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2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9</text:p>
          </table:table-cell>
          <table:table-cell table:style-name="Таблица3.E2" office:value-type="string">
            <text:p text:style-name="P29">Определение форм представления входных/выходных данных 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10</text:p>
          </table:table-cell>
          <table:table-cell table:style-name="Таблица3.E2" office:value-type="string">
            <text:p text:style-name="P29">Разработка структуры программы 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11</text:p>
          </table:table-cell>
          <table:table-cell table:style-name="Таблица3.E2" office:value-type="string">
            <text:p text:style-name="P29">Написание программного кода 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5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12</text:p>
          </table:table-cell>
          <table:table-cell table:style-name="Таблица3.E2" office:value-type="string">
            <text:p text:style-name="P29">Тестирование и первичная отладка 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2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13</text:p>
          </table:table-cell>
          <table:table-cell table:style-name="Таблица3.E2" office:value-type="string">
            <text:p text:style-name="P29">Расчет показателей качества программы 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14</text:p>
          </table:table-cell>
          <table:table-cell table:style-name="Таблица3.E2" office:value-type="string">
            <text:p text:style-name="P29">Анализ результатов тестовых испытаний и показателей качества 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>
          <table:table-cell table:style-name="Таблица3.E2" office:value-type="string">
            <text:p text:style-name="P29">15</text:p>
          </table:table-cell>
          <table:table-cell table:style-name="Таблица3.E2" office:value-type="string">
            <text:p text:style-name="P29">Проведение экономических расчетов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1</text:p>
          </table:table-cell>
          <table:table-cell table:style-name="Таблица3.E2" office:value-type="string">
            <text:p text:style-name="P29"/>
          </table:table-cell>
          <table:table-cell table:style-name="Таблица3.F2" office:value-type="string">
            <text:p text:style-name="P29"/>
          </table:table-cell>
        </table:table-row>
        <table:table-row table:style-name="Таблица3.18">
          <table:table-cell table:style-name="Таблица3.E2" office:value-type="string">
            <text:p text:style-name="P29">16</text:p>
          </table:table-cell>
          <table:table-cell table:style-name="Таблица3.E2" office:value-type="string">
            <text:p text:style-name="P29">Оформление документации по программе </text:p>
          </table:table-cell>
          <table:table-cell table:style-name="Таблица3.E2" office:value-type="string">
            <text:p text:style-name="P30">я</text:p>
          </table:table-cell>
          <table:table-cell table:style-name="Таблица3.E2" office:value-type="string">
            <text:p text:style-name="P29">2</text:p>
          </table:table-cell>
          <table:table-cell table:style-name="Таблица3.E2" office:value-type="string">
            <text:p text:style-name="P29"/>
          </table:table-cell>
          <table:table-cell table:style-name="Таблица3.F18" office:value-type="string">
            <text:p text:style-name="P2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Anton Boyarshinov</meta:initial-creator>
    <meta:creation-date>2008-09-02T15:39:21</meta:creation-date>
    <dc:date>2026-05-07T13:34:59.662994208</dc:date>
    <meta:editing-cycles>4</meta:editing-cycles>
    <meta:editing-duration>PT11M56S</meta:editing-duration>
    <meta:document-statistic meta:table-count="3" meta:image-count="0" meta:object-count="0" meta:page-count="8" meta:paragraph-count="277" meta:word-count="1607" meta:character-count="11894" meta:non-whitespace-character-count="10638"/>
    <meta:user-defined meta:name="Поле 1"/>
    <meta:user-defined meta:name="Поле 2"/>
    <meta:user-defined meta:name="Поле 3"/>
    <meta:user-defined meta:name="Поле 4"/>
  </office:meta>
</office:document-meta>
</file>